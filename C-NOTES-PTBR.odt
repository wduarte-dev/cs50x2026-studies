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A0000004CCB68F5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abela1" style:family="table">
      <style:table-properties style:width="7.1278in" fo:margin-left="0in" table:align="left"/>
    </style:style>
    <style:style style:name="Tabela1.A" style:family="table-column">
      <style:table-column-properties style:column-width="1.0639in"/>
    </style:style>
    <style:style style:name="Tabela1.B" style:family="table-column">
      <style:table-column-properties style:column-width="1.7486in"/>
    </style:style>
    <style:style style:name="Tabela1.C" style:family="table-column">
      <style:table-column-properties style:column-width="2.1875in"/>
    </style:style>
    <style:style style:name="Tabela1.D" style:family="table-column">
      <style:table-column-properties style:column-width="2.1278in"/>
    </style:style>
    <style:style style:name="Tabela1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Tabela2" style:family="table">
      <style:table-properties style:width="7.1278in" fo:margin-left="0in" table:align="left"/>
    </style:style>
    <style:style style:name="Tabela2.A" style:family="table-column">
      <style:table-column-properties style:column-width="7.1278in"/>
    </style:style>
    <style:style style:name="Tabela2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Arial" fo:font-size="22pt" fo:font-weight="bold" officeooo:rsid="001248c0" officeooo:paragraph-rsid="001248c0" fo:background-color="transparent" style:font-size-asian="22pt" style:font-weight-asian="bold" style:font-size-complex="22pt" style:font-weight-complex="bold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Arial" fo:font-size="10pt" fo:font-weight="bold" officeooo:rsid="00179cbc" officeooo:paragraph-rsid="00179cbc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Arial" fo:font-size="10pt" fo:font-weight="bold" officeooo:rsid="001248c0" officeooo:paragraph-rsid="001248c0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Arial" fo:font-size="12pt" fo:font-weight="bold" officeooo:rsid="001248c0" officeooo:paragraph-rsid="001248c0" fo:background-color="transparent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6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Arial" fo:font-size="12pt" fo:font-weight="normal" officeooo:rsid="0016f553" officeooo:paragraph-rsid="0016f553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Arial" fo:font-size="12pt" fo:font-weight="normal" officeooo:rsid="00179cbc" officeooo:paragraph-rsid="00179cbc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Arial" fo:font-size="12pt" fo:font-weight="normal" officeooo:rsid="00181938" officeooo:paragraph-rsid="00181938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Arial" fo:font-size="12pt" fo:font-weight="normal" officeooo:rsid="001a4ba9" officeooo:paragraph-rsid="001a4ba9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Arial" fo:font-size="12pt" fo:font-weight="normal" officeooo:rsid="001a4ba9" officeooo:paragraph-rsid="001a4ba9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Arial" fo:font-size="12pt" fo:font-weight="normal" officeooo:rsid="001ac15c" officeooo:paragraph-rsid="001ac15c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 style:writing-mode="lr-tb" style:writing-mode-automatic="false"/>
      <style:text-properties fo:color="#000000" loext:opacity="100%" style:font-name="Arial" fo:font-size="12pt" fo:font-weight="normal" officeooo:rsid="001ac15c" officeooo:paragraph-rsid="001ac15c" fo:background-color="transparent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officeooo:paragraph-rsid="001c17fc"/>
    </style:style>
    <style:style style:name="P16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officeooo:paragraph-rsid="001c17fc"/>
    </style:style>
    <style:style style:name="P17" style:family="paragraph" style:parent-style-name="Standard">
      <style:paragraph-properties fo:margin-top="0in" fo:margin-bottom="0in" style:contextual-spacing="false" fo:text-align="justify" style:justify-single-word="false" style:writing-mode="lr-tb" style:writing-mode-automatic="false"/>
      <style:text-properties fo:color="#000000" loext:opacity="100%" style:font-name="Arial" fo:font-size="12pt" fo:font-weight="normal" officeooo:rsid="001c17fc" officeooo:paragraph-rsid="001c17fc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Arial" fo:font-size="12pt" fo:font-weight="normal" officeooo:rsid="00193b12" officeooo:paragraph-rsid="00193b12" fo:background-color="transparent" style:font-size-asian="12pt" style:font-weight-asian="normal" style:font-size-complex="12pt" style:font-weight-complex="normal"/>
    </style:style>
    <style:style style:name="T1" style:family="text">
      <style:text-properties style:text-position="0% 100%" officeooo:rsid="006ace0c"/>
    </style:style>
    <style:style style:name="T2" style:family="text">
      <style:text-properties style:text-position="0% 100%"/>
    </style:style>
    <style:style style:name="T3" style:family="text">
      <style:text-properties style:font-name="Google Sans Text"/>
    </style:style>
    <style:style style:name="T4" style:family="text">
      <style:text-properties fo:font-weight="bold"/>
    </style:style>
    <style:style style:name="T5" style:family="text">
      <style:text-properties officeooo:rsid="00193b12"/>
    </style:style>
    <style:style style:name="T6" style:family="text">
      <style:text-properties style:font-name="Google Sans Text" officeooo:rsid="001c17fc"/>
    </style:style>
    <style:style style:name="T7" style:family="text">
      <style:text-properties style:font-name="Google Sans Text" officeooo:rsid="001d7a8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</text:span><text:span text:style-name="T2">inguagem C</text:span></text:p>
      <text:p text:style-name="P2">Curso CS50x </text:p>
      <text:p text:style-name="P3"/>
      <text:p text:style-name="P4">Tipos de dado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5"><text:span text:style-name="Strong_20_Emphasis"><text:span text:style-name="T3">Tipo em C</text:span></text:span></text:p>
            </table:table-cell>
            <table:table-cell table:style-name="Tabela1.A1" office:value-type="string">
              <text:p text:style-name="P5"><text:span text:style-name="Strong_20_Emphasis"><text:span text:style-name="T3">Exemplo de Valor</text:span></text:span></text:p>
            </table:table-cell>
            <table:table-cell table:style-name="Tabela1.A1" office:value-type="string">
              <text:p text:style-name="P5"><text:span text:style-name="Strong_20_Emphasis"><text:span text:style-name="T3">Tamanho na Memória</text:span></text:span></text:p>
            </table:table-cell>
            <table:table-cell table:style-name="Tabela1.A1" office:value-type="string">
              <text:p text:style-name="P5"><text:span text:style-name="Strong_20_Emphasis"><text:span text:style-name="T3">Formato para printf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6"><text:span text:style-name="Source_20_Text"><text:span text:style-name="T3">char</text:span></text:span></text:p>
          </table:table-cell>
          <table:table-cell table:style-name="Tabela1.A1" office:value-type="string">
            <text:p text:style-name="P6"><text:span text:style-name="Source_20_Text"><text:span text:style-name="T3">'A'</text:span></text:span><text:span text:style-name="T3">, </text:span><text:span text:style-name="Source_20_Text"><text:span text:style-name="T3">'7'</text:span></text:span></text:p>
          </table:table-cell>
          <table:table-cell table:style-name="Tabela1.A1" office:value-type="string">
            <text:p text:style-name="P7"><text:span text:style-name="T4">1 Byte</text:span> (8 bits)</text:p>
          </table:table-cell>
          <table:table-cell table:style-name="Tabela1.A1" office:value-type="string">
            <text:p text:style-name="P6"><text:span text:style-name="Source_20_Text"><text:span text:style-name="T3">%c</text:span></text:span></text:p>
          </table:table-cell>
        </table:table-row>
        <table:table-row>
          <table:table-cell table:style-name="Tabela1.A1" office:value-type="string">
            <text:p text:style-name="P6"><text:span text:style-name="Source_20_Text"><text:span text:style-name="T3">int</text:span></text:span></text:p>
          </table:table-cell>
          <table:table-cell table:style-name="Tabela1.A1" office:value-type="string">
            <text:p text:style-name="P6"><text:span text:style-name="Source_20_Text"><text:span text:style-name="T3">10</text:span></text:span><text:span text:style-name="T3">, </text:span><text:span text:style-name="Source_20_Text"><text:span text:style-name="T3">-500</text:span></text:span></text:p>
          </table:table-cell>
          <table:table-cell table:style-name="Tabela1.A1" office:value-type="string">
            <text:p text:style-name="P7"><text:span text:style-name="T4">4 Bytes</text:span> (32 bits)</text:p>
          </table:table-cell>
          <table:table-cell table:style-name="Tabela1.A1" office:value-type="string">
            <text:p text:style-name="P6"><text:span text:style-name="Source_20_Text"><text:span text:style-name="T3">%d</text:span></text:span><text:span text:style-name="T3"> ou </text:span><text:span text:style-name="Source_20_Text"><text:span text:style-name="T3">%i</text:span></text:span></text:p>
          </table:table-cell>
        </table:table-row>
        <table:table-row>
          <table:table-cell table:style-name="Tabela1.A1" office:value-type="string">
            <text:p text:style-name="P6"><text:span text:style-name="Source_20_Text"><text:span text:style-name="T3">float</text:span></text:span></text:p>
          </table:table-cell>
          <table:table-cell table:style-name="Tabela1.A1" office:value-type="string">
            <text:p text:style-name="P6"><text:span text:style-name="Source_20_Text"><text:span text:style-name="T3">3.14f</text:span></text:span></text:p>
          </table:table-cell>
          <table:table-cell table:style-name="Tabela1.A1" office:value-type="string">
            <text:p text:style-name="P7"><text:span text:style-name="T4">4 Bytes</text:span> (precisão simples)</text:p>
          </table:table-cell>
          <table:table-cell table:style-name="Tabela1.A1" office:value-type="string">
            <text:p text:style-name="P6"><text:span text:style-name="Source_20_Text"><text:span text:style-name="T3">%f</text:span></text:span></text:p>
          </table:table-cell>
        </table:table-row>
        <table:table-row>
          <table:table-cell table:style-name="Tabela1.A1" office:value-type="string">
            <text:p text:style-name="P6"><text:span text:style-name="Source_20_Text"><text:span text:style-name="T3">double</text:span></text:span></text:p>
          </table:table-cell>
          <table:table-cell table:style-name="Tabela1.A1" office:value-type="string">
            <text:p text:style-name="P6"><text:span text:style-name="Source_20_Text"><text:span text:style-name="T3">3.14159265</text:span></text:span></text:p>
          </table:table-cell>
          <table:table-cell table:style-name="Tabela1.A1" office:value-type="string">
            <text:p text:style-name="P7"><text:span text:style-name="T4">8 Bytes</text:span> (precisão dupla)</text:p>
          </table:table-cell>
          <table:table-cell table:style-name="Tabela1.A1" office:value-type="string">
            <text:p text:style-name="P6"><text:span text:style-name="Source_20_Text"><text:span text:style-name="T3">%lf</text:span></text:span></text:p>
          </table:table-cell>
        </table:table-row>
      </table:table>
      <text:p text:style-name="P8"/>
      <text:p text:style-name="P8">Source code → É o código que o programador escreve</text:p>
      <text:p text:style-name="P8">Machine code → É o conjunto de zeros e uns, linguagem que a máquina entende</text:p>
      <text:p text:style-name="P8">Compiler → É o responsável por “traduzir” o source code para o machine code</text:p>
      <text:p text:style-name="P9">GUI → Graphical user interface ou interface gráfica do usuário</text:p>
      <text:p text:style-name="P9">CLI → Command line interface ou inteface da linha de comando</text:p>
      <text:p text:style-name="P10">Escape sequences → São códigos especiais que podem ser inseridos em um printf que realizam algumas ações, como:</text:p>
      <text:p text:style-name="P10">\n: quebra de linha</text:p>
      <text:p text:style-name="P10">/r: carriage return, move o cursor para a extremidade esquerda do terminal</text:p>
      <text:p text:style-name="P10">\”, <text:span text:style-name="T5">\’, \\</text:span>: insere aspas duplas, <text:span text:style-name="T5">aspas simples ou barra invertida</text:span> sem que o compilador dispare um erro</text:p>
      <text:p text:style-name="P10">…</text:p>
      <text:p text:style-name="P10"/>
      <text:p text:style-name="P11"><draw:frame draw:style-name="fr1" draw:name="Figura1" text:anchor-type="char" svg:width="4.2701in" svg:height="0.7917in" draw:z-index="0"><draw:image xlink:href="Pictures/100000000000019A0000004CCB68F514.png" xlink:type="simple" xlink:show="embed" xlink:actuate="onLoad" draw:mime-type="image/png"/></draw:frame>Análise de erro em C</text:p>
      <text:p text:style-name="P12">hello.c → indica o arquivo em que o erro está</text:p>
      <text:p text:style-name="P12">“In function ‘main’” → a função onde o erro ocorreu</text:p>
      <text:p text:style-name="P12">hello.c:4:30 (x:y:z) → ‘x’ indica o arquivo, ‘y’ a linha onde ocorreu e ‘z’ o caractere exato daquela linha, contando da esquerda para a direita.</text:p>
      <text:p text:style-name="P12">error: o motivo do disparo do erro, nesse caso, o compilador esperava que a linha fosse terminar com ‘;’, o que não ocorreu.</text:p>
      <text:p text:style-name="P12"/>
      <text:p text:style-name="P13">Header files / libraries → Em C, são arquivos terminados em .h que incluem códigos feitos por outras pessoas, que podem ser usados nos seus. Popularmente conhecidos como bibiotecas.</text:p>
      <text:p text:style-name="P14"><text:soft-page-break/>Por exemplo, a biblioteca ‘stdio’ do C (standard input/output) que define a função printf, é por isso que sem ela o código nem compila.</text:p>
      <text:p text:style-name="P14"/>
      <table:table table:name="Tabela2" table:style-name="Tabela2">
        <table:table-column table:style-name="Tabela2.A"/>
        <table:table-header-rows>
          <table:table-row>
            <table:table-cell table:style-name="Tabela2.A1" office:value-type="string">
              <text:p text:style-name="P15"><text:span text:style-name="Strong_20_Emphasis"><text:span text:style-name="T6">Pendências</text:span></text:span></text:p>
            </table:table-cell>
          </table:table-row>
        </table:table-header-rows>
        <table:table-row>
          <table:table-cell table:style-name="Tabela2.A1" office:value-type="string">
            <text:p text:style-name="P16"><text:span text:style-name="Source_20_Text"><text:span text:style-name="T6">\0, char var[num], scanf, </text:span></text:span><text:span text:style-name="Source_20_Text"><text:span text:style-name="T7">comandos linux (cd, cp, ls, mkdir, mv, rm, rmdir...)</text:span></text:span></text:p>
          </table:table-cell>
        </table:table-row>
      </table:table>
      <text:p text:style-name="P17"/>
      <text:p text:style-name="P11"/>
      <text:p text:style-name="P1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1-01T14:28:30.863048091</meta:creation-date>
    <meta:generator>LibreOffice/26.2.4.2$Linux_X86_64 LibreOffice_project/620$Build-2</meta:generator>
    <meta:editing-cycles>0</meta:editing-cycles>
    <meta:editing-duration>P0D</meta:editing-duration>
    <meta:document-statistic meta:table-count="2" meta:image-count="1" meta:object-count="0" meta:page-count="2" meta:paragraph-count="42" meta:word-count="304" meta:character-count="1663" meta:non-whitespace-character-count="1400"/>
  </office:meta>
</office:document-meta>
</file>